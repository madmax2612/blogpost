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13d1" officeooo:paragraph-rsid="001213d1"/>
    </style:style>
    <style:style style:name="T1" style:family="text">
      <style:text-properties officeooo:rsid="001803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ip install </text:span>Django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8T22:52:19.714179667</meta:creation-date>
    <dc:date>2020-03-01T23:07:59.015317495</dc:date>
    <meta:editing-duration>PT3M38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3" meta:character-count="18" meta:non-whitespace-character-count="16"/>
  </office:meta>
</office:document-meta>
</file>